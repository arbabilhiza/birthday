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id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Happy Birthday Sayang ❤️&lt;/title&gt;</text:p>
      <text:p text:style-name="Standard"/>
      <text:p text:style-name="Standard">&lt;style&gt;</text:p>
      <text:p text:style-name="Standard"/>
      <text:p text:style-name="Standard">body{</text:p>
      <text:p text:style-name="Standard">margin:0;</text:p>
      <text:p text:style-name="Standard">font-family: 'Segoe UI', sans-serif;</text:p>
      <text:p text:style-name="Standard">background: linear-gradient(135deg,#ff4d6d,#ff8fa3);</text:p>
      <text:p text:style-name="Standard">color:white;</text:p>
      <text:p text:style-name="Standard">text-align:center;</text:p>
      <text:p text:style-name="Standard">overflow-x:hidden;</text:p>
      <text:p text:style-name="Standard">}</text:p>
      <text:p text:style-name="Standard"/>
      <text:p text:style-name="Standard">.container{</text:p>
      <text:p text:style-name="Standard">padding:60px 20px;</text:p>
      <text:p text:style-name="Standard">}</text:p>
      <text:p text:style-name="Standard"/>
      <text:p text:style-name="Standard">h1{</text:p>
      <text:p text:style-name="Standard">font-size:55px;</text:p>
      <text:p text:style-name="Standard">margin-bottom:10px;</text:p>
      <text:p text:style-name="Standard">}</text:p>
      <text:p text:style-name="Standard"/>
      <text:p text:style-name="Standard">h2{</text:p>
      <text:p text:style-name="Standard">font-weight:300;</text:p>
      <text:p text:style-name="Standard">}</text:p>
      <text:p text:style-name="Standard"/>
      <text:p text:style-name="Standard">button{</text:p>
      <text:p text:style-name="Standard">padding:15px 35px;</text:p>
      <text:p text:style-name="Standard">font-size:18px;</text:p>
      <text:p text:style-name="Standard">border:none;</text:p>
      <text:p text:style-name="Standard">border-radius:40px;</text:p>
      <text:p text:style-name="Standard">background:white;</text:p>
      <text:p text:style-name="Standard">color:#ff4d6d;</text:p>
      <text:p text:style-name="Standard">cursor:pointer;</text:p>
      <text:p text:style-name="Standard">margin-top:30px;</text:p>
      <text:p text:style-name="Standard">transition:0.3s;</text:p>
      <text:p text:style-name="Standard">}</text:p>
      <text:p text:style-name="Standard"/>
      <text:p text:style-name="Standard">button:hover{</text:p>
      <text:p text:style-name="Standard">transform:scale(1.1);</text:p>
      <text:p text:style-name="Standard">}</text:p>
      <text:p text:style-name="Standard"/>
      <text:p text:style-name="Standard">#message{</text:p>
      <text:p text:style-name="Standard">display:none;</text:p>
      <text:p text:style-name="Standard">max-width:600px;</text:p>
      <text:p text:style-name="Standard">margin:auto;</text:p>
      <text:p text:style-name="Standard">margin-top:40px;</text:p>
      <text:p text:style-name="Standard"><text:soft-page-break/>font-size:20px;</text:p>
      <text:p text:style-name="Standard">line-height:1.7;</text:p>
      <text:p text:style-name="Standard">animation:fade 2s;</text:p>
      <text:p text:style-name="Standard">}</text:p>
      <text:p text:style-name="Standard"/>
      <text:p text:style-name="Standard">img{</text:p>
      <text:p text:style-name="Standard">width:260px;</text:p>
      <text:p text:style-name="Standard">border-radius:20px;</text:p>
      <text:p text:style-name="Standard">margin-top:25px;</text:p>
      <text:p text:style-name="Standard">box-shadow:0 10px 30px rgba(0,0,0,0.3);</text:p>
      <text:p text:style-name="Standard">}</text:p>
      <text:p text:style-name="Standard"/>
      <text:p text:style-name="Standard">@keyframes fade{</text:p>
      <text:p text:style-name="Standard">from{opacity:0}</text:p>
      <text:p text:style-name="Standard">to{opacity:1}</text:p>
      <text:p text:style-name="Standard">}</text:p>
      <text:p text:style-name="Standard"/>
      <text:p text:style-name="Standard">/* animasi hati */</text:p>
      <text:p text:style-name="Standard"/>
      <text:p text:style-name="Standard">.heart{</text:p>
      <text:p text:style-name="Standard">position:fixed;</text:p>
      <text:p text:style-name="Standard">top:-10px;</text:p>
      <text:p text:style-name="Standard">color:pink;</text:p>
      <text:p text:style-name="Standard">font-size:20px;</text:p>
      <text:p text:style-name="Standard">animation:fall linear infinite;</text:p>
      <text:p text:style-name="Standard">}</text:p>
      <text:p text:style-name="Standard"/>
      <text:p text:style-name="Standard">@keyframes fall{</text:p>
      <text:p text:style-name="Standard">to{</text:p>
      <text:p text:style-name="Standard">transform:translateY(110vh);</text:p>
      <text:p text:style-name="Standard">}</text:p>
      <text:p text:style-name="Standard">}</text:p>
      <text:p text:style-name="Standard"/>
      <text:p text:style-name="Standard">footer{</text:p>
      <text:p text:style-name="Standard">margin-top:60px;</text:p>
      <text:p text:style-name="Standard">opacity:0.8;</text:p>
      <text:p text:style-name="Standard">}</text:p>
      <text:p text:style-name="Standard"/>
      <text:p text:style-name="Standard">&lt;/style&gt;</text:p>
      <text:p text:style-name="Standard">&lt;/head&gt;</text:p>
      <text:p text:style-name="Standard"/>
      <text:p text:style-name="Standard">&lt;body&gt;</text:p>
      <text:p text:style-name="Standard"/>
      <text:p text:style-name="Standard">&lt;div class="container"&gt;</text:p>
      <text:p text:style-name="Standard"/>
      <text:p text:style-name="Standard">&lt;h1&gt;Happy Birthday 🎂&lt;/h1&gt;</text:p>
      <text:p text:style-name="Standard">&lt;h2 id="nama"&gt;Untuk Kamu, Sayang ❤️&lt;/h2&gt;</text:p>
      <text:p text:style-name="Standard"/>
      <text:p text:style-name="Standard">&lt;p id="countdown"&gt;&lt;/p&gt;</text:p>
      <text:p text:style-name="Standard"/>
      <text:p text:style-name="Standard">&lt;button onclick="showLove()"&gt;Klik Untuk Kejutan 💌&lt;/button&gt;</text:p>
      <text:p text:style-name="Standard"/>
      <text:p text:style-name="Standard"><text:soft-page-break/>&lt;div id="message"&gt;</text:p>
      <text:p text:style-name="Standard"/>
      <text:p text:style-name="Standard">&lt;img src="foto.jpg"&gt;</text:p>
      <text:p text:style-name="Standard"/>
      <text:p text:style-name="Standard">&lt;p&gt;</text:p>
      <text:p text:style-name="Standard">Selamat ulang tahun cintaku ❤️&lt;br&gt;&lt;br&gt;</text:p>
      <text:p text:style-name="Standard"/>
      <text:p text:style-name="Standard">Terima kasih sudah hadir dalam hidupku, <text:s/></text:p>
      <text:p text:style-name="Standard">terima kasih sudah jadi alasan aku tersenyum setiap hari.&lt;br&gt;&lt;br&gt;</text:p>
      <text:p text:style-name="Standard"/>
      <text:p text:style-name="Standard">Semoga semua impian kamu tercapai, <text:s/></text:p>
      <text:p text:style-name="Standard">semoga kebahagiaan selalu menyertai kamu.&lt;br&gt;&lt;br&gt;</text:p>
      <text:p text:style-name="Standard"/>
      <text:p text:style-name="Standard">Dan aku berharap... <text:s/></text:p>
      <text:p text:style-name="Standard">aku masih jadi orang yang menemani kamu <text:s/></text:p>
      <text:p text:style-name="Standard">di ulang tahunmu yang berikutnya, dan berikutnya lagi. ❤️&lt;br&gt;&lt;br&gt;</text:p>
      <text:p text:style-name="Standard"/>
      <text:p text:style-name="Standard">I love you forever 💕</text:p>
      <text:p text:style-name="Standard">&lt;/p&gt;</text:p>
      <text:p text:style-name="Standard"/>
      <text:p text:style-name="Standard">&lt;/div&gt;</text:p>
      <text:p text:style-name="Standard"/>
      <text:p text:style-name="Standard">&lt;footer&gt;</text:p>
      <text:p text:style-name="Standard">dibuat khusus untuk kamu ✨</text:p>
      <text:p text:style-name="Standard">&lt;/footer&gt;</text:p>
      <text:p text:style-name="Standard"/>
      <text:p text:style-name="Standard">&lt;/div&gt;</text:p>
      <text:p text:style-name="Standard"/>
      <text:p text:style-name="Standard">&lt;audio autoplay loop&gt;</text:p>
      <text:p text:style-name="Standard">&lt;source src="musik.mp3" type="audio/mpeg"&gt;</text:p>
      <text:p text:style-name="Standard">&lt;/audio&gt;</text:p>
      <text:p text:style-name="Standard"/>
      <text:p text:style-name="Standard">&lt;script&gt;</text:p>
      <text:p text:style-name="Standard"/>
      <text:p text:style-name="Standard">/* tombol pesan */</text:p>
      <text:p text:style-name="Standard"/>
      <text:p text:style-name="Standard">function showLove(){</text:p>
      <text:p text:style-name="Standard">document.getElementById("message").style.display="block";</text:p>
      <text:p text:style-name="Standard">}</text:p>
      <text:p text:style-name="Standard"/>
      <text:p text:style-name="Standard">/* countdown */</text:p>
      <text:p text:style-name="Standard"/>
      <text:p text:style-name="Standard">var birthday = new Date("2026-12-25").getTime();</text:p>
      <text:p text:style-name="Standard"/>
      <text:p text:style-name="Standard">setInterval(function(){</text:p>
      <text:p text:style-name="Standard"/>
      <text:p text:style-name="Standard">var now = new Date().getTime();</text:p>
      <text:p text:style-name="Standard">var distance = birthday - now;</text:p>
      <text:p text:style-name="Standard"/>
      <text:p text:style-name="Standard">var days = Math.floor(distance / (1000 * 60 * 60 * 24));</text:p>
      <text:p text:style-name="Standard"/>
      <text:p text:style-name="Standard">document.getElementById("countdown").innerHTML =</text:p>
      <text:p text:style-name="Standard"><text:soft-page-break/>"Menuju ulang tahun kamu: " + days + " hari lagi 🎉";</text:p>
      <text:p text:style-name="Standard"/>
      <text:p text:style-name="Standard">},1000);</text:p>
      <text:p text:style-name="Standard"/>
      <text:p text:style-name="Standard">/* animasi hati */</text:p>
      <text:p text:style-name="Standard"/>
      <text:p text:style-name="Standard">function createHeart(){</text:p>
      <text:p text:style-name="Standard">const heart=document.createElement("div");</text:p>
      <text:p text:style-name="Standard">heart.classList.add("heart");</text:p>
      <text:p text:style-name="Standard">heart.innerHTML="❤";</text:p>
      <text:p text:style-name="Standard">heart.style.left=Math.random()*100+"vw";</text:p>
      <text:p text:style-name="Standard">heart.style.animationDuration=(Math.random()*3+3)+"s";</text:p>
      <text:p text:style-name="Standard">document.body.appendChild(heart);</text:p>
      <text:p text:style-name="Standard"/>
      <text:p text:style-name="Standard">setTimeout(()=&gt;{</text:p>
      <text:p text:style-name="Standard">heart.remove();</text:p>
      <text:p text:style-name="Standard">},6000);</text:p>
      <text:p text:style-name="Standard">}</text:p>
      <text:p text:style-name="Standard"/>
      <text:p text:style-name="Standard">setInterval(createHeart,300);</text:p>
      <text:p text:style-name="Standard"/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5:53:19.428788900</meta:creation-date>
    <dc:date>2026-03-09T15:54:24.012167000</dc:date>
    <meta:editing-duration>PT1M7S</meta:editing-duration>
    <meta:editing-cycles>1</meta:editing-cycles>
    <meta:document-statistic meta:table-count="0" meta:image-count="0" meta:object-count="0" meta:page-count="4" meta:paragraph-count="134" meta:word-count="274" meta:character-count="2542" meta:non-whitespace-character-count="2394"/>
    <meta:generator>LibreOffice/25.8.3.2$Windows_X86_64 LibreOffice_project/8ca8d55c161d602844f5428fa4b58097424e324e</meta:generator>
  </office:meta>
</office:document-meta>
</file>